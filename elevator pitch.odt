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97a5" officeooo:paragraph-rsid="001c97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website will serve as a space that allows the posting of indie fiction as well as collaborative fiction. Individuals will be able to share their works and be able to comment on and according to settings share others.</text:p>
      <text:p text:style-name="Standard"/>
      <text:p text:style-name="P1">The Website will contain a home page which will display an excerpt or two of the top voted works, a segment which give a few of the top categories, and a clickthrough to create a new account. There will be a page which shows a selection of categories. There will also be a page for each category which lets you scroll through works in that category, a brief description, the author, and votes.</text:p>
      <text:p text:style-name="P1"/>
      <text:p text:style-name="P1">The site will be unique through it’s focus on the collaborative elements of storytelling and it’s branding of being oh so very Chine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7T11:57:04.141776600</meta:creation-date>
    <dc:date>2026-06-17T17:14:00.043328000</dc:date>
    <meta:editing-duration>PT5H50S</meta:editing-duration>
    <meta:editing-cycles>1</meta:editing-cycles>
    <meta:document-statistic meta:table-count="0" meta:image-count="0" meta:object-count="0" meta:page-count="1" meta:paragraph-count="3" meta:word-count="135" meta:character-count="748" meta:non-whitespace-character-count="616"/>
    <meta:generator>LibreOffice/25.2.7.2$Windows_X86_64 LibreOffice_project/5cbfd1ab6520636bb5f7b99185aa69bd7456825d</meta:generator>
  </office:meta>
</office:document-meta>
</file>